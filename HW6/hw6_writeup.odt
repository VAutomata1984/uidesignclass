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ca414" officeooo:paragraph-rsid="001ca414"/>
    </style:style>
    <style:style style:name="P2" style:family="paragraph" style:parent-style-name="Standard" style:list-style-name="L1">
      <style:paragraph-properties fo:line-height="150%"/>
      <style:text-properties fo:font-style="italic" officeooo:rsid="001d6857" officeooo:paragraph-rsid="001d6857" style:font-style-asian="italic" style:font-style-complex="italic"/>
    </style:style>
    <style:style style:name="P3" style:family="paragraph" style:parent-style-name="Standard" style:list-style-name="L1">
      <style:paragraph-properties fo:line-height="150%"/>
      <style:text-properties fo:font-style="italic" fo:font-weight="normal" officeooo:rsid="001d6857" officeooo:paragraph-rsid="001d6857" style:font-style-asian="italic" style:font-weight-asian="normal" style:font-style-complex="italic" style:font-weight-complex="normal"/>
    </style:style>
    <style:style style:name="P4" style:family="paragraph" style:parent-style-name="Text_20_body" style:list-style-name="L1">
      <style:paragraph-properties fo:line-height="150%"/>
      <style:text-properties fo:font-style="italic" officeooo:rsid="002082e8" officeooo:paragraph-rsid="002082e8" style:font-style-asian="italic" style:font-style-complex="italic"/>
    </style:style>
    <style:style style:name="P5" style:family="paragraph" style:parent-style-name="Text_20_body" style:list-style-name="L2">
      <style:paragraph-properties fo:line-height="150%"/>
      <style:text-properties fo:font-style="normal" fo:font-weight="bold" officeooo:rsid="002082e8" officeooo:paragraph-rsid="002082e8" style:font-style-asian="normal" style:font-weight-asian="bold" style:font-style-complex="normal" style:font-weight-complex="bold"/>
    </style:style>
    <style:style style:name="P6" style:family="paragraph" style:parent-style-name="Text_20_body" style:list-style-name="L2">
      <style:paragraph-properties fo:line-height="150%"/>
      <style:text-properties fo:font-style="normal" fo:font-weight="bold" officeooo:rsid="0020d9bc" officeooo:paragraph-rsid="0020d9bc" style:font-style-asian="normal" style:font-weight-asian="bold" style:font-style-complex="normal" style:font-weight-complex="bold"/>
    </style:style>
    <style:style style:name="P7" style:family="paragraph" style:parent-style-name="Text_20_body" style:list-style-name="L2">
      <style:paragraph-properties fo:line-height="150%"/>
      <style:text-properties fo:font-style="normal" fo:font-weight="bold" officeooo:rsid="0023939d" officeooo:paragraph-rsid="0023939d" style:font-style-asian="normal" style:font-weight-asian="bold" style:font-style-complex="normal" style:font-weight-complex="bold"/>
    </style:style>
    <style:style style:name="P8" style:family="paragraph" style:parent-style-name="Text_20_body" style:list-style-name="L2">
      <style:paragraph-properties fo:line-height="150%"/>
      <style:text-properties fo:font-style="normal" fo:font-weight="bold" officeooo:rsid="00245272" officeooo:paragraph-rsid="00245272" style:font-style-asian="normal" style:font-weight-asian="bold" style:font-style-complex="normal" style:font-weight-complex="bold"/>
    </style:style>
    <style:style style:name="P9" style:family="paragraph" style:parent-style-name="Text_20_body" style:list-style-name="L2">
      <style:paragraph-properties fo:line-height="150%"/>
      <style:text-properties fo:font-style="normal" fo:font-weight="bold" officeooo:rsid="0026435d" officeooo:paragraph-rsid="0026435d" style:font-style-asian="normal" style:font-weight-asian="bold" style:font-style-complex="normal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20d9bc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ebd85" style:font-style-asian="normal" style:font-weight-asian="bold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6435d"/>
    </style:style>
    <style:style style:name="T6" style:family="text">
      <style:text-properties officeooo:rsid="0021a37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 Design </text:p>
      <text:p text:style-name="P1">HW 6 – Warm-up </text:p>
      <text:p text:style-name="P1"/>
      <text:list text:style-name="L1">
        <text:list-item>
          <text:p text:style-name="P2">What data will your website allow users to search?<text:span text:style-name="T1"> </text:span><text:span text:style-name="T2">Old School/Low Poly Horror Games</text:span></text:p>
        </text:list-item>
        <text:list-item>
          <text:p text:style-name="P3">What is an example of a person who would want to search this, and why? <text:span text:style-name="T3">A</text:span><text:span text:style-name="T2"> horror enthusiast has just finished the latest horror game, and is now in the mood for something retro. They want to look up which old-school (or retro-style) horror game would be good for them, and then pick that game to play. </text:span></text:p>
        </text:list-item>
        <text:list-item>
          <text:p text:style-name="P4"><text:span text:style-name="T4">Show up an example of one item in the database, and say how the data fields help the </text:span>user achieve their goal.</text:p>
        </text:list-item>
      </text:list>
      <text:list text:style-name="L2">
        <text:list-item>
          <text:list>
            <text:list-item>
              <text:p text:style-name="P5">Example from data: </text:p>
              <text:list>
                <text:list-item>
                  <text:p text:style-name="P6">id: <text:span text:style-name="T5">4</text:span></text:p>
                </text:list-item>
                <text:list-item>
                  <text:p text:style-name="P6">title: <text:span text:style-name="T6">Silent Hill 4 </text:span></text:p>
                </text:list-item>
                <text:list-item>
                  <text:p text:style-name="P7">image: link to image will go here</text:p>
                </text:list-item>
                <text:list-item>
                  <text:p text:style-name="P7">year: 2004</text:p>
                </text:list-item>
                <text:list-item>
                  <text:p text:style-name="P7">summary: summary of game’s plot will go here</text:p>
                </text:list-item>
                <text:list-item>
                  <text:p text:style-name="P7">developer: Team Silent </text:p>
                </text:list-item>
                <text:list-item>
                  <text:p text:style-name="P7">publisher: Konami </text:p>
                </text:list-item>
                <text:list-item>
                  <text:p text:style-name="P7">platforms: PS2, Xbox, Windows </text:p>
                </text:list-item>
                <text:list-item>
                  <text:p text:style-name="P7">genre: Survival Horror </text:p>
                </text:list-item>
                <text:list-item>
                  <text:p text:style-name="P7">mode: Single-Player</text:p>
                </text:list-item>
                <text:list-item>
                  <text:p text:style-name="P8">where-to-buy: GOG, Secondhand. </text:p>
                </text:list-item>
                <text:list-item>
                  <text:p text:style-name="P9">Similar game ids: [“1”, “2”, ”3”, “14”]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2T14:11:46.912811000</meta:creation-date>
    <meta:generator>LibreOffice/26.2.3.2$MacOSX_AARCH64 LibreOffice_project/70e089b17412e4cb7773e41413306b17a2328c34</meta:generator>
    <dc:date>2026-06-22T14:34:44.868488000</dc:date>
    <meta:editing-duration>PT22M55S</meta:editing-duration>
    <meta:editing-cycles>9</meta:editing-cycles>
    <meta:document-statistic meta:table-count="0" meta:image-count="0" meta:object-count="0" meta:page-count="1" meta:paragraph-count="18" meta:word-count="164" meta:character-count="852" meta:non-whitespace-character-count="711"/>
  </office:meta>
</office:document-meta>
</file>